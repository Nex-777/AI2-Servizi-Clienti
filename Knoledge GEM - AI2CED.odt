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24000001CE95BD339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Standard">
      <style:text-properties officeooo:paragraph-rsid="000eb54c"/>
    </style:style>
    <style:style style:name="P6" style:family="paragraph" style:parent-style-name="Standard">
      <style:text-properties officeooo:rsid="000c9820" officeooo:paragraph-rsid="000c9820"/>
    </style:style>
    <style:style style:name="P7" style:family="paragraph" style:parent-style-name="Standard">
      <style:text-properties officeooo:paragraph-rsid="000c9820"/>
    </style:style>
    <style:style style:name="T1" style:family="text">
      <style:text-properties fo:font-weight="bold"/>
    </style:style>
    <style:style style:name="T2" style:family="text">
      <style:text-properties officeooo:rsid="000d72e0"/>
    </style:style>
    <style:style style:name="T3" style:family="text">
      <style:text-properties officeooo:rsid="000c98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sto Tecnico e Architettura (Definita da Software Architect):</text:p>
      <text:list text:style-name="L1">
        <text:list-item>
          <text:p text:style-name="P2"><text:span text:style-name="T1">Stack:</text:span> Frontend React (ottimizzato per interazioni mobili/desktop), Backend Supabase (PostgreSQL, Auth, Edge Functions, RLS).</text:p>
        </text:list-item>
        <text:list-item>
          <text:p text:style-name="P2"><text:span text:style-name="T1">Design (Stitch integration):</text:span> Desktop -&gt; Visualizzazione Tabellare (Sticky column sinistra). Mobile -&gt; Visualizzazione Hybrid Table-Card.</text:p>
        </text:list-item>
        <text:list-item>
          <text:p text:style-name="P2"><text:span text:style-name="T1">Autenticazione:</text:span> <text:span text:style-name="T2">Accesso via user a pass</text:span>. Area protetta "Super Admin" per il consulente.</text:p>
        </text:list-item>
        <text:list-item>
          <text:p text:style-name="P2"><text:span text:style-name="T1">Gestione Dati (GIS Ranocchi):</text:span> Il sistema ingerisce file CSV nominati strutturalmente (es. <text:span text:style-name="Source_20_Text">PRE0000990000202604.csv</text:span>). Il parsing gestisce i Codici Fiscali ma essi vengono resi invisibili lato Frontend ai titolari per questioni di privacy (GDPR).</text:p>
        </text:list-item>
        <text:list-item>
          <text:p text:style-name="P2"><text:span text:style-name="T1">Sicurezza (RLS):</text:span> Severa Row Level Security su Supabase. Ogni Titolare vede rigorosamente solo i dipendenti associati al proprio <text:span text:style-name="Source_20_Text">client_id</text:span> (Codice Ditta).</text:p>
        </text:list-item>
        <text:list-item>
          <text:p text:style-name="P2"><text:span text:style-name="T1">Motore Giustificativi:</text:span> Inserimento ore e giustificativi basato sui codici esatti di GIS (es. <text:span text:style-name="Source_20_Text">*FE</text:span>, <text:span text:style-name="Source_20_Text">*MA</text:span>) con Legenda sempre accessibile a schermo per supportare i non esperti. Nessun campo di testo libero.</text:p>
        </text:list-item>
        <text:list-item>
          <text:p text:style-name="P2"><text:span text:style-name="T1">Validazioni (Future-proof):</text:span> L'architettura del database deve prevedere hook per future validazioni (massimale ore, limiti festivi).</text:p>
        </text:list-item>
      </text:list>
      <text:p text:style-name="Text_20_body"><text:span text:style-name="T1">Ruoli Assunti dall'Intelligenza Artificiale (Antigravity Agents):</text:span> Il sistema interagirà con gli agenti Antigravity assumendo ruoli tecnici specifici in base alla fase:</text:p>
      <text:list text:style-name="L2">
        <text:list-item>
          <text:p text:style-name="P3"><text:span text:style-name="T1">Engineering Manager:</text:span> Suddivide il lavoro in task atomici. Gestisce il flusso e l'interazione con l'utente umano.</text:p>
        </text:list-item>
        <text:list-item>
          <text:p text:style-name="P3"><text:span text:style-name="T1">Software Architect:</text:span> Definisce lo schema del DB Supabase e le policy RLS.</text:p>
        </text:list-item>
        <text:list-item>
          <text:p text:style-name="P3"><text:span text:style-name="T1">Technical Lead / Senior Developer:</text:span> Scrive il codice React/Supabase client, implementa il parsing CSV.</text:p>
        </text:list-item>
      </text:list>
      <text:p text:style-name="Text_20_body"><text:span text:style-name="T1">Regola d'Oro dell'Interazione (Protocollo di Blocco Umano):</text:span> L'utente umano è un non-sviluppatore. L'agente Antigravity <text:span text:style-name="T1">NON DEVE MAI</text:span> procedere in autonomia se è richiesta un'azione esterna (es. creare un progetto su Supabase, copiare chiavi API, creare il repo GitHub). La procedura operativa per l'agente è:</text:p>
      <text:list text:style-name="L3">
        <text:list-item>
          <text:p text:style-name="P4">Spiegare all'utente l'azione manuale necessaria (es. "Vai su supabase.com, clicca New Project, copia URL e ANON KEY"). Istruzioni a prova di bambino, passo-passo.</text:p>
        </text:list-item>
        <text:list-item>
          <text:p text:style-name="P4"><text:span text:style-name="T1">FERMARSI E ATTENDERE.</text:span> L'agente deve chiedere esplicitamente all'utente: "Scrivi 'FATTO' e forniscimi le chiavi per continuare".</text:p>
        </text:list-item>
        <text:list-item>
          <text:p text:style-name="P4">Solo dopo la conferma umana, l'agente esegue il codice o passa allo step successivo.</text:p>
        </text:list-item>
      </text:list>
      <text:p text:style-name="P5"><text:line-break/><text:line-break/><text:line-break/></text:p>
      <text:p text:style-name="P5"><text:line-break/><text:line-break/><text:line-break/><text:soft-page-break/><text:span text:style-name="T3">Elenco Giustificativi piu usati:<text:line-break/><text:line-break/></text:span>*FE - Ferie<text:line-break/>*PE - Permessi<text:line-break/>*RO - ROL<text:line-break/>*EF - EXFestività<text:line-break/>*ML - Malattia</text:p>
      <text:p text:style-name="Standard">*PA - Permessi aziendali <text:line-break/>*NP - Assenza non retribuita<text:line-break/>*DS - Donazione sangue<text:line-break/>*IN - Infortunio<text:line-break/>*MT - Maternità Obbligatoria<text:line-break/>*MO - Maternità Facoltativa<text:line-break/>*AT – Allattamento<text:line-break/><text:span text:style-name="T3">GEN – Generale per casi non previsti dalle altre voci</text:span></text:p>
      <text:p text:style-name="Standard"/>
      <text:p text:style-name="Standard"/>
      <text:p text:style-name="P6">Visuale del file .csv creato da GIS e metodi di modifica</text:p>
      <text:p text:style-name="P7"><text:line-break/></text:p>
      <text:p text:style-name="Standard"><draw:frame draw:style-name="fr1" draw:name="Immagine1" text:anchor-type="char" svg:width="17cm" svg:height="5.967cm" draw:z-index="0"><draw:image xlink:href="Pictures/1000000100000524000001CE95BD33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16:01:12.083114000</meta:creation-date>
    <dc:date>2026-04-30T22:34:55.707188200</dc:date>
    <meta:editing-duration>PT8M2S</meta:editing-duration>
    <meta:editing-cycles>4</meta:editing-cycles>
    <meta:generator>LibreOffice/26.2.1.2$Windows_X86_64 LibreOffice_project/620$Build-2</meta:generator>
    <meta:document-statistic meta:table-count="0" meta:image-count="1" meta:object-count="0" meta:page-count="2" meta:paragraph-count="21" meta:word-count="388" meta:character-count="2684" meta:non-whitespace-character-count="2317"/>
  </office:meta>
</office:document-meta>
</file>